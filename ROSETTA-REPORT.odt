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Mono" fo:font-size="24pt" style:text-underline-style="solid" style:text-underline-width="bold" style:text-underline-color="font-color" fo:font-weight="bold" officeooo:rsid="00184f6f" officeooo:paragraph-rsid="00184f6f" style:font-size-asian="24pt" style:font-weight-asian="bold" style:font-size-complex="24pt" style:font-weight-complex="bold"/>
    </style:style>
    <style:style style:name="P2" style:family="paragraph" style:parent-style-name="Standard">
      <style:text-properties style:font-name="Noto Sans Mono" fo:font-size="11.5pt" officeooo:rsid="00184f6f" officeooo:paragraph-rsid="00184f6f" style:font-size-asian="11.5pt" style:font-size-complex="11.5pt"/>
    </style:style>
    <style:style style:name="P3" style:family="paragraph" style:parent-style-name="Standard">
      <style:paragraph-properties fo:text-align="center" style:justify-single-word="false"/>
      <style:text-properties style:font-name="Noto Sans Mono" fo:font-size="16pt" fo:font-weight="bold" officeooo:rsid="00184f6f" officeooo:paragraph-rsid="00184f6f"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Noto Sans Mono" fo:font-size="14pt" fo:font-weight="bold" officeooo:rsid="00184f6f" officeooo:paragraph-rsid="00184f6f"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Noto Sans Mono" fo:font-size="16pt" officeooo:rsid="00184f6f" officeooo:paragraph-rsid="00184f6f" style:font-size-asian="16pt" style:font-size-complex="16pt"/>
    </style:style>
    <style:style style:name="P6" style:family="paragraph" style:parent-style-name="Standard">
      <style:text-properties style:font-name="Noto Sans Mono" fo:font-size="12.5pt" fo:font-weight="bold" officeooo:rsid="00184f6f" officeooo:paragraph-rsid="00184f6f" style:font-size-asian="12.5pt" style:font-weight-asian="bold" style:font-size-complex="12.5pt" style:font-weight-complex="bold"/>
    </style:style>
    <style:style style:name="P7" style:family="paragraph" style:parent-style-name="Standard">
      <style:text-properties style:font-name="Noto Sans Mono" fo:font-size="11.5pt" officeooo:rsid="00184f6f" officeooo:paragraph-rsid="0019333d" style:font-size-asian="11.5pt" style:font-size-complex="11.5pt"/>
    </style:style>
    <style:style style:name="P8" style:family="paragraph" style:parent-style-name="Standard">
      <style:text-properties style:font-name="Noto Sans Mono" fo:font-size="11.5pt" officeooo:rsid="001bea4f" officeooo:paragraph-rsid="001bea4f" style:font-size-asian="11.5pt" style:font-size-complex="11.5pt"/>
    </style:style>
    <style:style style:name="P9" style:family="paragraph" style:parent-style-name="Standard">
      <style:text-properties style:font-name="Noto Sans Mono" fo:font-size="11.5pt" officeooo:rsid="0019333d" officeooo:paragraph-rsid="0019333d" style:font-size-asian="11.5pt" style:font-size-complex="11.5pt"/>
    </style:style>
    <style:style style:name="P10" style:family="paragraph" style:parent-style-name="Standard">
      <style:text-properties style:font-name="Noto Sans Mono" fo:font-size="11.5pt" style:text-underline-style="solid" style:text-underline-width="auto" style:text-underline-color="font-color" fo:font-weight="bold" officeooo:rsid="001cf989" officeooo:paragraph-rsid="001cf989" style:font-size-asian="11.5pt" style:font-weight-asian="bold" style:font-size-complex="11.5pt" style:font-weight-complex="bold"/>
    </style:style>
    <style:style style:name="P11" style:family="paragraph" style:parent-style-name="Standard">
      <style:text-properties style:font-name="Noto Sans Mono" fo:font-size="11.5pt" style:text-underline-style="solid" style:text-underline-width="auto" style:text-underline-color="font-color" fo:font-weight="normal" officeooo:rsid="001cf989" officeooo:paragraph-rsid="001cf989" style:font-size-asian="11.5pt" style:font-weight-asian="normal" style:font-size-complex="11.5pt" style:font-weight-complex="normal"/>
    </style:style>
    <style:style style:name="P12" style:family="paragraph" style:parent-style-name="Standard">
      <style:text-properties style:font-name="Noto Sans Mono" fo:font-size="11.5pt" fo:font-weight="normal" officeooo:rsid="001cf989" officeooo:paragraph-rsid="001cf989" style:font-size-asian="11.5pt" style:font-weight-asian="normal" style:font-size-complex="11.5pt" style:font-weight-complex="normal"/>
    </style:style>
    <style:style style:name="P13" style:family="paragraph" style:parent-style-name="Standard">
      <style:text-properties style:font-name="Noto Sans Mono" fo:font-size="11.5pt" fo:font-weight="normal" officeooo:rsid="001fa947" officeooo:paragraph-rsid="001fa947" style:font-size-asian="11.5pt" style:font-weight-asian="normal" style:font-size-complex="11.5pt" style:font-weight-complex="normal"/>
    </style:style>
    <style:style style:name="P14" style:family="paragraph" style:parent-style-name="Standard">
      <style:text-properties style:font-name="Noto Sans Mono" fo:font-size="13pt" fo:font-weight="normal" officeooo:rsid="001fa947" officeooo:paragraph-rsid="0021f9d3" style:font-size-asian="13pt" style:font-weight-asian="normal" style:font-size-complex="13pt" style:font-weight-complex="normal"/>
    </style:style>
    <style:style style:name="P15" style:family="paragraph" style:parent-style-name="Standard">
      <style:text-properties style:font-name="Noto Sans Mono" fo:font-size="11.5pt" fo:font-weight="normal" officeooo:rsid="001fa947" officeooo:paragraph-rsid="0021f9d3" style:font-size-asian="11.5pt" style:font-weight-asian="normal" style:font-size-complex="11.5pt" style:font-weight-complex="normal"/>
    </style:style>
    <style:style style:name="P16" style:family="paragraph" style:parent-style-name="Standard">
      <style:text-properties style:font-name="Noto Sans Mono" fo:font-size="11.5pt" fo:font-weight="normal" officeooo:rsid="00215d52" officeooo:paragraph-rsid="00215d52" style:font-size-asian="10.0500001907349pt" style:font-weight-asian="normal" style:font-size-complex="11.5pt" style:font-weight-complex="normal"/>
    </style:style>
    <style:style style:name="P17" style:family="paragraph" style:parent-style-name="Standard">
      <style:text-properties style:font-name="Noto Sans Mono" fo:font-size="11.5pt" fo:font-weight="normal" officeooo:rsid="0021f9d3" officeooo:paragraph-rsid="0021f9d3" style:font-size-asian="10.0500001907349pt" style:font-weight-asian="normal" style:font-size-complex="11.5pt" style:font-weight-complex="normal"/>
    </style:style>
    <style:style style:name="P18" style:family="paragraph" style:parent-style-name="Standard">
      <style:text-properties style:font-name="Noto Sans Mono" fo:font-size="11.5pt" fo:font-weight="normal" officeooo:rsid="00224983" officeooo:paragraph-rsid="00224983" style:font-size-asian="10.0500001907349pt" style:font-weight-asian="normal" style:font-size-complex="11.5pt" style:font-weight-complex="normal"/>
    </style:style>
    <style:style style:name="P19" style:family="paragraph" style:parent-style-name="Standard">
      <style:text-properties style:font-name="Noto Sans Mono" fo:font-size="11.5pt" fo:font-weight="normal" officeooo:rsid="00253c24" officeooo:paragraph-rsid="00253c24" style:font-size-asian="10.0500001907349pt" style:font-weight-asian="normal" style:font-size-complex="11.5pt" style:font-weight-complex="normal"/>
    </style:style>
    <style:style style:name="P20" style:family="paragraph" style:parent-style-name="Standard">
      <style:text-properties style:font-name="Noto Sans Mono" fo:font-size="11.5pt" fo:font-weight="normal" officeooo:rsid="00267a7c" officeooo:paragraph-rsid="00267a7c" style:font-size-asian="10.0500001907349pt" style:font-weight-asian="normal" style:font-size-complex="11.5pt" style:font-weight-complex="normal"/>
    </style:style>
    <style:style style:name="P21" style:family="paragraph" style:parent-style-name="Standard">
      <style:text-properties style:font-name="Noto Sans Mono" fo:font-size="11.5pt" fo:font-weight="normal" officeooo:rsid="0027ed5c" officeooo:paragraph-rsid="0027ed5c" style:font-size-asian="10.0500001907349pt" style:font-weight-asian="normal" style:font-size-complex="11.5pt" style:font-weight-complex="normal"/>
    </style:style>
    <style:style style:name="P22" style:family="paragraph" style:parent-style-name="Standard">
      <style:text-properties style:font-name="Noto Sans Mono" fo:font-size="11.5pt" fo:font-weight="bold" officeooo:rsid="0027ed5c" officeooo:paragraph-rsid="0027ed5c" style:font-size-asian="10.0500001907349pt" style:font-weight-asian="bold" style:font-size-complex="11.5pt" style:font-weight-complex="bold"/>
    </style:style>
    <style:style style:name="P23" style:family="paragraph" style:parent-style-name="Standard">
      <style:text-properties style:font-name="Noto Sans Mono" fo:font-size="11.5pt" fo:font-weight="normal" officeooo:rsid="0028d5ec" officeooo:paragraph-rsid="0028d5ec" style:font-size-asian="10.0500001907349pt" style:font-weight-asian="normal" style:font-size-complex="11.5pt" style:font-weight-complex="normal"/>
    </style:style>
    <style:style style:name="T1" style:family="text">
      <style:text-properties officeooo:rsid="001cf989"/>
    </style:style>
    <style:style style:name="T2" style:family="text">
      <style:text-properties fo:font-weight="bold" style:font-weight-asian="bold" style:font-weight-complex="bold"/>
    </style:style>
    <style:style style:name="T3" style:family="text">
      <style:text-properties officeooo:rsid="001b4da0"/>
    </style:style>
    <style:style style:name="T4" style:family="text">
      <style:text-properties officeooo:rsid="001bea4f"/>
    </style:style>
    <style:style style:name="T5" style:family="text">
      <style:text-properties officeooo:rsid="0019333d"/>
    </style:style>
    <style:style style:name="T6" style:family="text">
      <style:text-properties officeooo:rsid="001e23ed"/>
    </style:style>
    <style:style style:name="T7" style:family="text">
      <style:text-properties officeooo:rsid="001998ce"/>
    </style:style>
    <style:style style:name="T8" style:family="text">
      <style:text-properties officeooo:rsid="001fa947"/>
    </style:style>
    <style:style style:name="T9" style:family="text">
      <style:text-properties officeooo:rsid="00215d52"/>
    </style:style>
    <style:style style:name="T10" style:family="text">
      <style:text-properties fo:font-size="11.5pt" style:font-size-asian="11.5pt" style:font-size-complex="11.5pt"/>
    </style:style>
    <style:style style:name="T11" style:family="text">
      <style:text-properties style:text-position="super 58%" fo:font-size="16pt" style:font-size-asian="16pt" style:font-size-complex="16pt"/>
    </style:style>
    <style:style style:name="T12" style:family="text">
      <style:text-properties fo:font-size="11.5pt" officeooo:rsid="00215d52" style:font-size-asian="10.0500001907349pt" style:font-size-complex="11.5pt"/>
    </style:style>
    <style:style style:name="T13" style:family="text">
      <style:text-properties fo:font-size="11.5pt" officeooo:rsid="0021f9d3" style:font-size-asian="10.0500001907349pt" style:font-size-complex="11.5pt"/>
    </style:style>
    <style:style style:name="T14" style:family="text">
      <style:text-properties officeooo:rsid="0021f9d3"/>
    </style:style>
    <style:style style:name="T15" style:family="text">
      <style:text-properties style:text-position="0% 100%"/>
    </style:style>
    <style:style style:name="T16" style:family="text">
      <style:text-properties officeooo:rsid="00253c24"/>
    </style:style>
    <style:style style:name="T17" style:family="text">
      <style:text-properties officeooo:rsid="0024356e"/>
    </style:style>
    <style:style style:name="T18" style:family="text">
      <style:text-properties style:text-position="super 58%" fo:font-size="16pt" officeooo:rsid="00267a7c" style:font-size-asian="16pt" style:font-size-complex="16pt"/>
    </style:style>
    <style:style style:name="T19" style:family="text">
      <style:text-properties style:text-position="super 58%" fo:font-size="18pt" officeooo:rsid="0028d5ec" style:font-size-asian="18pt" style:font-size-complex="18pt"/>
    </style:style>
    <style:style style:name="T20" style:family="text">
      <style:text-properties officeooo:rsid="0028d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SETTA SECRET COMMUNICATIONS</text:p>
      <text:p text:style-name="P2"><text:s text:c="20"/></text:p>
      <text:p text:style-name="P3">System <text:span text:style-name="T1">D</text:span>esign, <text:span text:style-name="T1">I</text:span>mplementation <text:span text:style-name="T1">&amp; Optimization</text:span></text:p>
      <text:p text:style-name="P4"/>
      <text:p text:style-name="P5"/>
      <text:p text:style-name="P6">I. Quick Introduction</text:p>
      <text:p text:style-name="P2"/>
      <text:p text:style-name="P2">This has been an incredible solo project for me. I started it as an early-intermediate C systems developer on GNU/Linux. Having undertaken it has taught me colossal amounts in topics spanning from the basics, such as the dangers of feature creep and the importance of checking for and handling errors in GNU/Linux syscalls, to the intermediate, such as writing easy-to-maintain Makefiles, to advanced, such as compiler optimizations &amp; ways a programmer can influence them positively in source code by (correctly) using compiler hints like <text:span text:style-name="T2">__restrict__</text:span> and refactors that open up the compiler's eyes when deciding which of its own optimizations to apply, as well as features of the C language whose purpose doesn't become apparent until <text:span text:style-name="T3">one has written</text:span> a system that's way beyond trivial in size, like function pointers. It continues to be a valuable platform <text:span text:style-name="T3">where I can practice </text:span>advanced <text:span text:style-name="T4">systems </text:span>programming.</text:p>
      <text:p text:style-name="P2"/>
      <text:p text:style-name="P2">In its essence, <text:span text:style-name="T5">Rosetta</text:span> is a system that allows secret communication.</text:p>
      <text:p text:style-name="P2"/>
      <text:p text:style-name="P2">I have implemented the following 5 main components completely from scratch using only the C language, its standard library, GNU/Linux system calls and standard GCC compiler features, without external depend<text:span text:style-name="T5">e</text:span>ncies on any libraries and importantly - without using vibe coding or "AI"-generated code at all, as I have concluded firmly that this practice, when over-used to generate code that is <text:span text:style-name="T5">then </text:span>blindly added to a non-trivial engineering project as long as it appears to work (it more often than not doesn't) DIMINISHES an engineer's skills.</text:p>
      <text:p text:style-name="P2"/>
      <text:p text:style-name="P2">1. Big Integer math engine: <text:span text:style-name="T5">From ADD/SUB to </text:span>Montgomery Multiplication.</text:p>
      <text:p text:style-name="P2">2. Cryptography engine: chacha20, blake2b, argon2, <text:span text:style-name="T5">s</text:span>ignatures <text:span text:style-name="T5">and more.</text:span></text:p>
      <text:p text:style-name="P2">3. Communication server</text:p>
      <text:p text:style-name="P2">4. Communication client</text:p>
      <text:p text:style-name="P2">5. Test Framework, simulating <text:span text:style-name="T5">real human users </text:span>with local OS processes.</text:p>
      <text:p text:style-name="P2"/>
      <text:p text:style-name="P2">In the end, it came out to be <text:span text:style-name="T2">roughly 10,000 lines of C code.</text:span></text:p>
      <text:p text:style-name="P7"/>
      <text:p text:style-name="P7"><text:span text:style-name="T6">Rosetta </text:span>is designed to be highly modular:</text:p>
      <text:p text:style-name="P7"><text:soft-page-break/>The BigInt math &amp; cryptography engines can be used for other purpos<text:span text:style-name="T3">es.</text:span></text:p>
      <text:p text:style-name="P2"/>
      <text:p text:style-name="P2"><text:span text:style-name="T3">T</text:span>he communication client and server are designed to allow any number of communication mechanisms to be <text:span text:style-name="T3">easily</text:span> used in the system, as long as <text:span text:style-name="T4">said mechanism</text:span> <text:span text:style-name="T4">implements </text:span>4 basic functions - begin communication, send payload, receive payload and end communication. <text:span text:style-name="T4">Such elegance and modularity is possible thanks to a </text:span>polymorphic C interface, whose only requirement is that, at system initialization, 4 function pointers are set to the respective C <text:span text:style-name="T3">or C++ </text:span>functions that, <text:span text:style-name="T5">in turn,</text:span> implement the 4 respectiv<text:span text:style-name="T4">e</text:span> <text:span text:style-name="T5">communication </text:span>tasks. Currently two communication interfaces are supported: <text:span text:style-name="T3">1) </text:span>Internet communication over TCP using Internet sockets and <text:span text:style-name="T3">2)</text:span> local OS processes sending each other messages via Unix Domain sockets, to simulate human users in the Rosetta Test Framework. A future possible addition here could be radio communication where the client runs on a custom embedded communicator device.</text:p>
      <text:p text:style-name="P2"/>
      <text:p text:style-name="P2">Lastly on modularity, the client allows for multiple different "client driver" programs to be written, thus prov<text:span text:style-name="T5">i</text:span>ding different ways to use Rosetta. They simply need to use the API exposed by the Client Primary Functions collection <text:span text:style-name="T5">found in the header file under the same name</text:span></text:p>
      <text:p text:style-name="P2">and the client driver program can <text:span text:style-name="T5">then </text:span>wrap these in higher-level end-user facing functionality, <text:span text:style-name="T7">where the users can be people texting each other over the internet or just as easily – a set of machines that must automatically deliver messages to each other in secret. </text:span>This is how, as <text:span text:style-name="T5">mentioned</text:span> above, radio messaging using a custom embedded communicator device could be implemented <text:span text:style-name="T4">in the future</text:span>. So far, I have two client driver programs - a <text:span text:style-name="T7">human </text:span>user-facing C++ wxWidgets GUI that supports the creation and joining of chat rooms <text:span text:style-name="T5">and </text:span><text:span text:style-name="T7">secondly, </text:span><text:span text:style-name="T4">the</text:span> <text:span text:style-name="T5">set of </text:span>manual <text:span text:style-name="T4">and</text:span><text:span text:style-name="T7"> automatic </text:span>user-spawn<text:span text:style-name="T5">ing</text:span> programs for whole-system test simulations</text:p>
      <text:p text:style-name="P8">in the Rosetta Test Framework.</text:p>
      <text:p text:style-name="P2"/>
      <text:p text:style-name="P9">Wrapping up the introduction, I give an overview of the security scheme that the Rosetta system uses and implements. <text:span text:style-name="T1">When reading it, please note that the parameters, such as bit size of prime numbers and </text:span><text:span text:style-name="T8">of</text:span><text:span text:style-name="T1"> cryptography artifacts like salts and nonces, can easily be updated in the future, should security concerns dictate doing so.</text:span></text:p>
      <text:p text:style-name="P9"/>
      <text:p text:style-name="P10">Rosetta Security Scheme overview</text:p>
      <text:p text:style-name="P11"/>
      <text:p text:style-name="P12">Everything begins with <text:span text:style-name="T6">2 big prime numbers: </text:span><text:span text:style-name="T8">3072-bit M - the D</text:span><text:span text:style-name="T6">iffie-</text:span><text:span text:style-name="T8">H</text:span><text:span text:style-name="T6">ellman modulus - and </text:span><text:span text:style-name="T8">320-bit prime Q, where (M-1) is divisible by Q.</text:span></text:p>
      <text:p text:style-name="P13"><text:soft-page-break/>Rosetta comes with a utility program to discover such pairs of primes, using Rabin-Miller primality test provided by my BigInt math engine. <text:span text:style-name="T9">Once we have M and Q, we compute the Diffie-Hellman generator G:</text:span></text:p>
      <text:p text:style-name="P14"><text:span text:style-name="T10">G = 2</text:span><text:span text:style-name="T11">(M-1) / Q</text:span><text:span text:style-name="T10"> mod M</text:span></text:p>
      <text:p text:style-name="P15"/>
      <text:p text:style-name="P14"><text:span text:style-name="T12">Now the server generates its long-term private/public key pair (b,B). </text:span><text:span text:style-name="T13">Private key has the </text:span><text:span text:style-name="T13">same bitwidth as Q and is strictly smaller than Q:</text:span></text:p>
      <text:p text:style-name="P16">- Private key b = 320 <text:span text:style-name="T14">pseudorandom </text:span>bit<text:span text:style-name="T14">s</text:span> <text:span text:style-name="T14">taken from</text:span> /dev/urandom, <text:span text:style-name="T14">b &lt; Q.</text:span></text:p>
      <text:p text:style-name="P16">- Public <text:s/>key B = G<text:span text:style-name="T11">b</text:span><text:span text:style-name="T15"> mod M</text:span></text:p>
      <text:p text:style-name="P17">Server’s long-term public key B, its Montgomery form Bm, as well as M, Q, G and G’s Montgomery form Gm are all available to clients at install.</text:p>
      <text:p text:style-name="P17"/>
      <text:p text:style-name="P18">Internet connection is <text:span text:style-name="T16">NOT</text:span> needed for a client to create a local savefile. This is called <text:span text:style-name="T2">Registration</text:span>. The user picks a password. <text:span text:style-name="T17">The client software generates the user’s long-term private/public key pair (a,A) exactly like the server </text:span><text:span text:style-name="T16">does it</text:span><text:span text:style-name="T17">. </text:span>The password is used as a key in Argon2<text:span text:style-name="T16">id</text:span> to produce a 64-byte hash T. <text:span text:style-name="T16">The most significant 32 bytes of hash T are </text:span>then used as a key in ChaCha20 to encrypt the user’s private key. <text:span text:style-name="T16">The ChaCha20 Nonce and Argon2id Salt are stored on the client machine in the savefile, along with the user’s public key and encrypted private key.</text:span></text:p>
      <text:p text:style-name="P18"/>
      <text:p text:style-name="P19">A user must <text:span text:style-name="T2">log in</text:span> before joining a chat room to talk to others in secret. For this, the user enters their password, it’s analogously used in Argon2 to produce hash T, the most significant 32 bytes of that hash are used in ChaCha20 to decrypt the user’s private key. A public key is computed from that private key. If it matches the stored public key, the password was correct and the login proceeds to connect to the Rosetta server.</text:p>
      <text:p text:style-name="P19"/>
      <text:p text:style-name="P20">The client sends their long-term public key to the server in encrypted form using a very short-lived ephemeral public/private key pair that was generated by both the server and the client to produce a short-lived DH shared secret just for that purpose. Short-lived unidirectional session keys KAB/KBA are extracted from the shared secret and used to encrypt/decrypt communication until the server has the client’s long-term public key. Once the server obtains &amp; decrypts the client long-term public key, the short-lived key pairs &amp; shared secret are destroyed. HMAC authentication is used before the server has the client’s long-term public key. Schnorr Signatures are used after that.</text:p>
      <text:p text:style-name="P19"/>
      <text:p text:style-name="P20"><text:soft-page-break/>When Alice and Bob meet in a chat room, regardless of whether they’ve met before, they always first perform a handshake. The server first sends them the other side’s public key. They compute a shared secret X and extract unidirectional session keys KAB and KBA, as well as a chacha Nonce from the shared secret:</text:p>
      <text:p text:style-name="P19"/>
      <text:p text:style-name="P19">1. Alice's client computes a session-length shared secret: X = B<text:span text:style-name="T18">a</text:span> mod M <text:s text:c="8"/></text:p>
      <text:p text:style-name="P19"><text:s text:c="3"/>Bob's <text:s text:c="2"/>client computes the same session shared secret: X = A<text:span text:style-name="T18">b</text:span> mod M <text:s text:c="8"/></text:p>
      <text:p text:style-name="P19"><text:s text:c="81"/></text:p>
      <text:p text:style-name="P19">2. On Alice's side: <text:s text:c="61"/></text:p>
      <text:p text:style-name="P19"><text:s text:c="6"/>KAB = least significant 32 bytes of X <text:s text:c="37"/></text:p>
      <text:p text:style-name="P19"><text:s text:c="6"/>KBA = next 32 bytes of X. <text:s text:c="49"/></text:p>
      <text:p text:style-name="P19"><text:s text:c="81"/></text:p>
      <text:p text:style-name="P19"><text:s text:c="3"/>On Bob's side: <text:s text:c="63"/></text:p>
      <text:p text:style-name="P19"><text:s text:c="6"/>KBA = least significant 32 bytes of X <text:s text:c="37"/></text:p>
      <text:p text:style-name="P19"><text:s text:c="6"/>KAB = next 32 bytes of X. <text:s text:c="49"/></text:p>
      <text:p text:style-name="P19"><text:s text:c="81"/></text:p>
      <text:p text:style-name="P19">3. On Alice's side, swap KAB with KBA if A &lt; B. <text:s text:c="33"/></text:p>
      <text:p text:style-name="P19"><text:s text:c="3"/>On Bob's side, <text:s text:c="2"/>swap KBA with KAB if A &gt; B. <text:s text:c="33"/></text:p>
      <text:p text:style-name="P19"><text:s text:c="81"/></text:p>
      <text:p text:style-name="P19">This ensures KAB and KBA are the same on Alice's and Bob's sides.</text:p>
      <text:p text:style-name="P19"/>
      <text:p text:style-name="P20">Whether Alice uses session key KAB to send to Bob and Bob uses KAB to receive from Alice and then KBA is used in the other direction, or the other way around, is decided by asking “who was in the chat room first?”</text:p>
      <text:p text:style-name="P21">Alice and Bob each have 2 symmetric ChaCha20 Nonce counters, one for Alice sending to Bob and one for Bob sending to Alice. They are incremented on each usage of ChaCha20 because re-using the same Nonce with the same ChaCha20 key is forbidden.</text:p>
      <text:p text:style-name="P21"/>
      <text:p text:style-name="P21">When Alice decides to send a secret message to Bob, Carol and Fred as they are all in the same chat room, she generates a pseudorandom one time use key K for each message. Alice encrypts one-time-use key K with chacha20, using the unidirectional session key KAB/KBA she has with all other guests (from her Diffie-Hellman shared secret that she has with everyone). This produces 3 encrypted versions of the one-time-use key K – KB, KC and KF. Now Alice uses plaintext version of one time use key K to encrypt the secret payload itself. Lastly, she generates a Schnorr Signature on the payload and sends the encrypted message, the encrypted keys used to decrypt the message (for each person) and her signature.</text:p>
      <text:p text:style-name="P21"/>
      <text:p text:style-name="P22">So the secret message is hidden behind not one, but two keys.</text:p>
      <text:p text:style-name="P21"><text:soft-page-break/></text:p>
      <text:p text:style-name="P21"/>
      <text:p text:style-name="P21">To compute a Schnorr Signature, the steps are: <text:s text:c="16"/></text:p>
      <text:p text:style-name="P21"><text:s text:c="81"/></text:p>
      <text:p text:style-name="P21">0. Call BLAKE2B{64} with input - whatever we're signing. <text:s text:c="24"/></text:p>
      <text:p text:style-name="P21"><text:s text:c="3"/>The produced 64-byte hash of this is called the prehash PH. <text:s text:c="18"/></text:p>
      <text:p text:style-name="P21"><text:s text:c="81"/></text:p>
      <text:p text:style-name="P21">1. Call BLAKE2B{64} with input - the signer's private key concatenated</text:p>
      <text:p text:style-name="P21"><text:s text:c="3"/>with the prehash, reduce the result of this modulo (Q-1), add 1.</text:p>
      <text:p text:style-name="P21"/>
      <text:p text:style-name="P21">Yields secret: k = (BLAKE2B{64}(a||PH) mod (Q-1)) + 1 <text:s text:c="39"/></text:p>
      <text:p text:style-name="P21"><text:s text:c="81"/></text:p>
      <text:p text:style-name="P21">2. Compute R = G<text:span text:style-name="T19">k</text:span> mod M <text:s text:c="123"/></text:p>
      <text:p text:style-name="P21">3. Compute e = BLAKE2B{64}(R||PH), truncated to bitwidth of Q. <text:s text:c="95"/></text:p>
      <text:p text:style-name="P21">4. Compute s = ( k + ((Q - a) × e) ) mod Q <text:s text:c="38"/></text:p>
      <text:p text:style-name="P21"><text:s text:c="81"/></text:p>
      <text:p text:style-name="P22">The signature itself is (s,e)</text:p>
      <text:p text:style-name="P21">---------------------------------------------</text:p>
      <text:p text:style-name="P21">To verify against public key A and whatever was signed, the receiver: <text:s text:c="11"/></text:p>
      <text:p text:style-name="P21"><text:s text:c="81"/></text:p>
      <text:p text:style-name="P21">0. checks that 0 &lt;= s &lt; Q and that e has the bitwidth of Q. <text:s text:c="4"/></text:p>
      <text:p text:style-name="P21"><text:s text:c="81"/></text:p>
      <text:p text:style-name="P21">1. Computes the prehash PH as in step 0 <text:span text:style-name="T20">above.</text:span> <text:s text:c="33"/></text:p>
      <text:p text:style-name="P21"><text:s text:c="81"/></text:p>
      <text:p text:style-name="P21">2. Computes R = (G<text:span text:style-name="T19">s</text:span> * A<text:span text:style-name="T19">e</text:span>) mod M. <text:s text:c="46"/></text:p>
      <text:p text:style-name="P21"><text:s text:c="81"/></text:p>
      <text:p text:style-name="P21">3. Computes val_e = BLAKE2B{64}(R||PH), truncated to bitwidth of Q. <text:s text:c="13"/></text:p>
      <text:p text:style-name="P21"><text:s text:c="3"/>Check that this is equal to e. If it is, validation passed. <text:s text:c="18"/></text:p>
      <text:p text:style-name="P21"><text:s text:c="3"/>Under any other circumstances, validation fails.</text:p>
      <text:p text:style-name="P21"/>
      <text:p text:style-name="P23">In the end, when Bob receives Alice’s secret message (which was relayed by the Rosetta server which itself computed its own Schborr signature so the receiver can authenticate it too), he first validates the server’s signature, so he is assured that the message really was relayed by the real Rosetta server and was not altered en-route. Then he validates Alice’s own signature, assuring himself that the message really was sent by her and wasn’t altered en-route. He uses the same unidirectional session key KAB/KBA (extracted from his shared secret with Alice) to decrypt the one-time use key K, then he uses the decrypted key K to actually decrypt the secret message itself and read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9T14:30:53.148133001</meta:creation-date>
    <dc:date>2026-04-29T17:31:29.361968068</dc:date>
    <meta:editing-duration>PT7M55S</meta:editing-duration>
    <meta:editing-cycles>2</meta:editing-cycles>
    <meta:generator>LibreOffice/25.8.6.2$Linux_X86_64 LibreOffice_project/580$Build-2</meta:generator>
    <meta:document-statistic meta:table-count="0" meta:image-count="0" meta:object-count="0" meta:page-count="5" meta:paragraph-count="78" meta:word-count="1754" meta:character-count="12197" meta:non-whitespace-character-count="8585"/>
  </office:meta>
</office:document-meta>
</file>